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4000003914FFF3D8EA1CE0E8E.png" manifest:media-type="image/png"/>
  <manifest:file-entry manifest:full-path="Pictures/1000020100000716000003C5AC6E4E1CAD9E913F.png" manifest:media-type="image/png"/>
  <manifest:file-entry manifest:full-path="Pictures/1000020100000710000003C78A9218AE1038AEC2.png" manifest:media-type="image/png"/>
  <manifest:file-entry manifest:full-path="Pictures/10000201000003BF0000029E5C2DB01830A97848.png" manifest:media-type="image/png"/>
  <manifest:file-entry manifest:full-path="Pictures/10000000000001F7000001F00AAE08FBCBD29A3E.png" manifest:media-type="image/png"/>
  <manifest:file-entry manifest:full-path="Pictures/1000020100000258000000F65C5C9010FFCD1E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left="0.4in" fo:margin-right="0.0335in" fo:margin-top="0.0335in" fo:margin-bottom="0.0335in" loext:contextual-spacing="false" style:line-height-at-least="0.25in" fo:text-indent="-0.4in" style:auto-text-indent="false"/>
      <style:text-properties style:use-window-font-color="true" style:font-name="Times New Roman" fo:font-size="13pt" fo:letter-spacing="-0.0102in" fo:font-weight="bold" officeooo:paragraph-rsid="00062716" style:font-size-asian="13pt" style:font-weight-asian="bold" style:font-name-complex="Times New Roman2" style:font-size-complex="13pt" style:font-weight-complex="bold"/>
    </style:style>
    <style:style style:name="P2" style:family="paragraph" style:parent-style-name="Standard">
      <style:text-properties style:font-name="Times New Roman" fo:font-size="13pt" officeooo:paragraph-rsid="00062716" style:font-size-asian="13pt" style:font-size-complex="13pt"/>
    </style:style>
    <style:style style:name="P3" style:family="paragraph" style:parent-style-name="Standard">
      <style:text-properties style:font-name="Times New Roman" fo:font-size="13pt" officeooo:paragraph-rsid="00062716" fo:background-color="#ffffff" style:font-size-asian="13pt" style:font-size-complex="13pt"/>
    </style:style>
    <style:style style:name="P4"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3bb3a" officeooo:paragraph-rsid="00062716" style:font-size-asian="13pt" style:font-weight-asian="normal" style:font-name-complex="Times New Roman1" style:font-size-complex="13pt" style:font-weight-complex="normal"/>
    </style:style>
    <style:style style:name="P5"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43963" officeooo:paragraph-rsid="00062716" style:font-size-asian="13pt" style:font-weight-asian="normal" style:font-name-complex="Times New Roman1" style:font-size-complex="13pt" style:font-weight-complex="normal"/>
    </style:style>
    <style:style style:name="P6"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64489" officeooo:paragraph-rsid="00062716" style:font-size-asian="13pt" style:font-weight-asian="normal" style:font-name-complex="Times New Roman1" style:font-size-complex="13pt" style:font-weight-complex="normal"/>
    </style:style>
    <style:style style:name="P7"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17a2f" officeooo:paragraph-rsid="00062716" style:font-size-asian="13pt" style:font-weight-asian="normal" style:font-name-complex="Times New Roman1" style:font-size-complex="13pt" style:font-weight-complex="normal"/>
    </style:style>
    <style:style style:name="P8" style:family="paragraph" style:parent-style-name="Standard">
      <style:paragraph-properties fo:margin-left="0in" fo:margin-right="0in" fo:line-height="120%" fo:text-align="center"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17a2f" officeooo:paragraph-rsid="00062716" style:font-size-asian="13pt" style:font-weight-asian="normal" style:font-name-complex="Times New Roman1" style:font-size-complex="13pt" style:font-weight-complex="normal"/>
    </style:style>
    <style:style style:name="P9"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851e3" officeooo:paragraph-rsid="00062716" style:font-size-asian="13pt" style:font-weight-asian="normal" style:font-name-complex="Times New Roman1" style:font-size-complex="13pt" style:font-weight-complex="normal"/>
    </style:style>
    <style:style style:name="P10"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paragraph-rsid="00062716" style:font-size-asian="13pt" style:font-size-complex="13pt"/>
    </style:style>
    <style:style style:name="P11"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8f373" officeooo:paragraph-rsid="00062716" style:font-size-asian="13pt" style:font-weight-asian="normal" style:font-name-complex="Times New Roman1" style:font-size-complex="13pt" style:font-weight-complex="normal"/>
    </style:style>
    <style:style style:name="P12"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292b2c" style:font-name="Times New Roman" fo:font-size="13pt" fo:letter-spacing="normal" fo:font-style="normal" fo:font-weight="normal" officeooo:paragraph-rsid="00062716" style:font-size-asian="13pt" style:font-size-complex="13pt"/>
    </style:style>
    <style:style style:name="P13"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292b2c" style:font-name="Times New Roman" fo:font-size="13pt" fo:letter-spacing="normal" fo:font-style="normal" fo:font-weight="normal" officeooo:rsid="00264489" officeooo:paragraph-rsid="00062716" style:font-size-asian="13pt" style:font-size-complex="13pt"/>
    </style:style>
    <style:style style:name="P14"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292b2c" style:font-name="Times New Roman" fo:font-size="13pt" fo:letter-spacing="normal" fo:font-style="normal" fo:font-weight="normal" officeooo:rsid="00269f8c" officeooo:paragraph-rsid="00062716" style:font-size-asian="13pt" style:font-size-complex="13pt"/>
    </style:style>
    <style:style style:name="P15" style:family="paragraph" style:parent-style-name="body">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69f8c" officeooo:paragraph-rsid="00062716" style:font-size-asian="13pt" style:font-size-complex="13pt"/>
    </style:style>
    <style:style style:name="P16" style:family="paragraph" style:parent-style-name="body">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17a2f" officeooo:paragraph-rsid="00062716" style:font-size-asian="13pt" style:font-weight-asian="normal" style:font-size-complex="13pt" style:font-weight-complex="normal"/>
    </style:style>
    <style:style style:name="P17" style:family="paragraph" style:parent-style-name="body">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17a2f" officeooo:paragraph-rsid="00062716" style:font-size-asian="13pt" style:font-weight-asian="normal" style:font-name-complex="Times New Roman1" style:font-size-complex="13pt" style:font-weight-complex="normal"/>
    </style:style>
    <style:style style:name="P18" style:family="paragraph" style:parent-style-name="body">
      <style:paragraph-properties fo:margin-left="0in" fo:margin-right="0in" fo:line-height="120%" fo:text-align="center"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17a2f" officeooo:paragraph-rsid="00062716" style:font-size-asian="13pt" style:font-weight-asian="normal" style:font-name-complex="Times New Roman1" style:font-size-complex="13pt" style:font-weight-complex="normal"/>
    </style:style>
    <style:style style:name="P19" style:family="paragraph" style:parent-style-name="body">
      <style:paragraph-properties fo:margin-left="0in" fo:margin-right="0in" fo:line-height="120%" fo:text-align="justify" style:justify-single-word="false" fo:orphans="2" fo:widows="2" fo:text-indent="0.3937in" style:auto-text-indent="false"/>
      <style:text-properties fo:font-variant="normal" fo:text-transform="none" fo:color="#292b2c" style:font-name="Times New Roman" fo:font-size="13pt" fo:letter-spacing="normal" fo:font-style="normal" fo:font-weight="normal" officeooo:rsid="00269f8c" officeooo:paragraph-rsid="00062716" style:font-size-asian="13pt" style:font-size-complex="13pt"/>
    </style:style>
    <style:style style:name="P20" style:family="paragraph" style:parent-style-name="body">
      <style:paragraph-properties fo:margin-left="0in" fo:margin-right="0in" fo:line-height="120%" fo:text-align="justify" style:justify-single-word="false" fo:orphans="2" fo:widows="2" fo:text-indent="0.3937in" style:auto-text-indent="false"/>
      <style:text-properties fo:font-variant="normal" fo:text-transform="none" fo:color="#292b2c" style:font-name="Times New Roman" fo:font-size="13pt" fo:letter-spacing="normal" fo:font-style="normal" fo:font-weight="normal" officeooo:rsid="00269f8c" officeooo:paragraph-rsid="00062716" fo:background-color="#ffffff" style:font-size-asian="13pt" style:font-size-complex="13pt"/>
    </style:style>
    <style:style style:name="P21" style:family="paragraph" style:parent-style-name="body">
      <style:paragraph-properties fo:margin-left="0in" fo:margin-right="0in" fo:line-height="120%" fo:text-align="justify" style:justify-single-word="false" fo:orphans="2" fo:widows="2" fo:text-indent="0.3937in" style:auto-text-indent="false"/>
      <style:text-properties fo:font-variant="normal" fo:text-transform="none" fo:color="#292b2c" style:font-name="Times New Roman" fo:font-size="13pt" fo:letter-spacing="normal" fo:font-style="normal" fo:font-weight="normal" officeooo:rsid="00264489" officeooo:paragraph-rsid="00062716" fo:background-color="#ffffff" style:font-size-asian="13pt" style:font-size-complex="13pt"/>
    </style:style>
    <style:style style:name="P22" style:family="paragraph" style:parent-style-name="Standard">
      <style:paragraph-properties fo:margin-left="0.1665in" fo:margin-right="0in" fo:text-indent="0in" style:auto-text-indent="false"/>
      <style:text-properties style:font-name="Times New Roman" fo:font-size="13pt" officeooo:paragraph-rsid="00062716" style:font-size-asian="13pt" style:font-name-complex="Times New Roman2" style:font-size-complex="13pt"/>
    </style:style>
    <style:style style:name="P23" style:family="paragraph" style:parent-style-name="HTML_20_Preformatted">
      <loext:graphic-properties draw:fill="solid" draw:fill-color="#f1f1f1"/>
      <style:paragraph-properties fo:margin-left="0.1665in" fo:margin-right="0in" fo:text-indent="0in" style:auto-text-indent="false" fo:background-color="#f1f1f1" fo:padding-left="0.028in" fo:padding-right="0.0555in" fo:padding-top="0.0555in" fo:padding-bottom="0.0555in" fo:border="0.74pt solid #d6d6d6"/>
      <style:text-properties style:font-name="Times New Roman" fo:font-size="13pt" officeooo:paragraph-rsid="00062716" style:font-size-asian="13pt" style:font-name-complex="Times New Roman2" style:font-size-complex="13pt"/>
    </style:style>
    <style:style style:name="P24" style:family="paragraph" style:parent-style-name="HTML_20_Preformatted">
      <loext:graphic-properties draw:fill="solid" draw:fill-color="#f1f1f1"/>
      <style:paragraph-properties fo:margin-left="0.1665in" fo:margin-right="0in" fo:line-height="120%" fo:text-align="justify" style:justify-single-word="false" fo:orphans="2" fo:widows="2" fo:text-indent="0in" style:auto-text-indent="false" fo:background-color="#f1f1f1" fo:padding-left="0.028in" fo:padding-right="0.0555in" fo:padding-top="0.0555in" fo:padding-bottom="0.0555in" fo:border="0.74pt solid #d6d6d6"/>
      <style:text-properties fo:font-variant="normal" fo:text-transform="none" fo:color="#000000" style:font-name="Times New Roman" fo:font-size="13pt" fo:letter-spacing="normal" fo:font-style="normal" fo:font-weight="normal" officeooo:rsid="00269f8c" officeooo:paragraph-rsid="00062716" style:font-size-asian="13pt" style:font-size-complex="13pt"/>
    </style:style>
    <style:style style:name="P25" style:family="paragraph" style:parent-style-name="HTML_20_Preformatted">
      <loext:graphic-properties draw:fill="solid" draw:fill-color="#f1f1f1"/>
      <style:paragraph-properties fo:margin-left="0.1665in" fo:margin-right="0in" fo:text-indent="0in" style:auto-text-indent="false" fo:background-color="#f1f1f1" fo:padding="0.0555in" fo:border="0.74pt solid #d6d6d6"/>
      <style:text-properties style:font-name="Times New Roman" fo:font-size="13pt" officeooo:paragraph-rsid="00062716" style:font-size-asian="13pt" style:font-name-complex="Times New Roman2" style:font-size-complex="13pt"/>
    </style:style>
    <style:style style:name="P26" style:family="paragraph" style:parent-style-name="HTML_20_Preformatted">
      <loext:graphic-properties draw:fill="solid" draw:fill-color="#f1f1f1"/>
      <style:paragraph-properties fo:margin-left="0.1665in" fo:margin-right="0in" fo:line-height="120%" fo:text-align="justify" style:justify-single-word="false" fo:orphans="2" fo:widows="2" fo:text-indent="0in" style:auto-text-indent="false" fo:background-color="#f1f1f1" fo:padding="0.0555in" fo:border="0.74pt solid #d6d6d6"/>
      <style:text-properties fo:font-variant="normal" fo:text-transform="none" fo:color="#292b2c" style:font-name="Times New Roman" fo:font-size="13pt" fo:letter-spacing="normal" fo:font-style="normal" fo:font-weight="normal" officeooo:rsid="00269f8c" officeooo:paragraph-rsid="00062716" style:font-size-asian="13pt" style:font-name-complex="Times New Roman2" style:font-size-complex="13pt"/>
    </style:style>
    <style:style style:name="P27" style:family="paragraph" style:parent-style-name="HTML_20_Preformatted">
      <loext:graphic-properties draw:fill="solid" draw:fill-color="#f1f1f1"/>
      <style:paragraph-properties fo:margin-left="0.1665in" fo:margin-right="0in" fo:line-height="120%" fo:text-align="justify" style:justify-single-word="false" fo:orphans="2" fo:widows="2" fo:text-indent="0in" style:auto-text-indent="false" fo:background-color="#f1f1f1" fo:padding="0.0555in" fo:border="0.74pt solid #d6d6d6"/>
      <style:text-properties fo:font-variant="normal" fo:text-transform="none" fo:color="#292b2c" style:font-name="Times New Roman" fo:font-size="13pt" fo:letter-spacing="normal" fo:font-style="normal" fo:font-weight="normal" officeooo:rsid="00269f8c" officeooo:paragraph-rsid="00062716" style:font-size-asian="13pt" style:font-name-complex="Times New Roman2" style:font-size-complex="13pt" style:font-weight-complex="bold"/>
    </style:style>
    <style:style style:name="P28" style:family="paragraph" style:parent-style-name="HTML_20_Preformatted">
      <loext:graphic-properties draw:fill="solid" draw:fill-color="#f1f1f1"/>
      <style:paragraph-properties fo:margin-left="0.1665in" fo:margin-right="0in" fo:line-height="120%" fo:text-align="justify" style:justify-single-word="false" fo:orphans="2" fo:widows="2" fo:text-indent="0in" style:auto-text-indent="false" fo:background-color="#f1f1f1" fo:padding="0.0555in" fo:border="0.74pt solid #d6d6d6"/>
      <style:text-properties fo:font-variant="normal" fo:text-transform="none" fo:color="#292b2c" style:font-name="Times New Roman" fo:font-size="13pt" fo:letter-spacing="normal" fo:font-style="normal" fo:font-weight="normal" officeooo:rsid="00269f8c" officeooo:paragraph-rsid="00062716" fo:background-color="#ffffff" style:font-size-asian="13pt" style:font-name-complex="Times New Roman2" style:font-size-complex="13pt"/>
    </style:style>
    <style:style style:name="P29" style:family="paragraph" style:parent-style-name="HTML_20_Preformatted">
      <loext:graphic-properties draw:fill="solid" draw:fill-color="#f1f1f1"/>
      <style:paragraph-properties fo:margin-left="0.1665in" fo:margin-right="0in" fo:line-height="120%" fo:text-align="justify" style:justify-single-word="false" fo:orphans="2" fo:widows="2" fo:text-indent="0in" style:auto-text-indent="false" fo:background-color="#f1f1f1" fo:padding="0.0555in" fo:border="0.74pt solid #d6d6d6"/>
      <style:text-properties fo:font-variant="normal" fo:text-transform="none" fo:color="#292b2c" style:font-name="Times New Roman" fo:font-size="13pt" fo:letter-spacing="normal" fo:font-style="normal" fo:font-weight="normal" officeooo:rsid="00264489" officeooo:paragraph-rsid="00062716" fo:background-color="#ffffff" style:font-size-asian="13pt" style:font-name-complex="Times New Roman2" style:font-size-complex="13pt"/>
    </style:style>
    <style:style style:name="P30" style:family="paragraph" style:parent-style-name="HTML_20_Preformatted">
      <loext:graphic-properties draw:fill="solid" draw:fill-color="#f1f1f1"/>
      <style:paragraph-properties fo:margin-left="0.1665in" fo:margin-right="0in" fo:line-height="120%" fo:text-align="justify" style:justify-single-word="false" fo:orphans="2" fo:widows="2" fo:text-indent="0in" style:auto-text-indent="false" fo:background-color="#f1f1f1" fo:padding="0.0555in" fo:border="0.74pt solid #d6d6d6"/>
      <style:text-properties fo:font-variant="normal" fo:text-transform="none" fo:color="#000000" style:font-name="Times New Roman" fo:font-size="13pt" fo:letter-spacing="normal" fo:language="vi" fo:country="VN" fo:font-style="normal" fo:font-weight="normal" officeooo:rsid="002851e3" officeooo:paragraph-rsid="00062716" style:font-size-asian="13pt" style:font-weight-asian="normal" style:font-name-complex="Times New Roman2" style:font-size-complex="13pt" style:font-weight-complex="normal"/>
    </style:style>
    <style:style style:name="P31" style:family="paragraph" style:parent-style-name="HTML_20_Preformatted">
      <loext:graphic-properties draw:fill="solid" draw:fill-color="#f1f1f1"/>
      <style:paragraph-properties fo:margin-left="0.1665in" fo:margin-right="0in" fo:line-height="120%" fo:text-align="justify" style:justify-single-word="false" fo:orphans="2" fo:widows="2" fo:text-indent="0in" style:auto-text-indent="false" fo:background-color="#f1f1f1" fo:padding="0.0555in" fo:border="0.74pt solid #d6d6d6"/>
      <style:text-properties fo:font-variant="normal" fo:text-transform="none" fo:color="#000000" style:font-name="Times New Roman" fo:font-size="13pt" fo:letter-spacing="normal" fo:language="vi" fo:country="VN" fo:font-style="normal" fo:font-weight="normal" officeooo:rsid="00217a2f" officeooo:paragraph-rsid="00062716" style:font-size-asian="13pt" style:font-weight-asian="normal" style:font-name-complex="Times New Roman2" style:font-size-complex="13pt" style:font-weight-complex="normal"/>
    </style:style>
    <style:style style:name="P32" style:family="paragraph" style:parent-style-name="Table_20_Contents">
      <style:paragraph-properties fo:text-align="justify" style:justify-single-word="false"/>
      <style:text-properties style:font-name="Times New Roman" fo:font-size="13pt" officeooo:paragraph-rsid="00062716" style:font-size-asian="13pt" style:font-name-complex="Times New Roman1" style:font-size-complex="13pt"/>
    </style:style>
    <style:style style:name="P33" style:family="paragraph" style:parent-style-name="Table_20_Contents">
      <style:paragraph-properties fo:text-align="justify" style:justify-single-word="false"/>
      <style:text-properties style:font-name="Times New Roman" fo:font-size="13pt" officeooo:rsid="00264489" officeooo:paragraph-rsid="00062716" style:font-size-asian="13pt" style:font-name-complex="Times New Roman1" style:font-size-complex="13pt"/>
    </style:style>
    <style:style style:name="P34" style:family="paragraph" style:parent-style-name="Text_20_body">
      <style:text-properties style:font-name="Times New Roman" fo:font-size="13pt" officeooo:paragraph-rsid="00062716" style:font-size-asian="13pt" style:font-size-complex="13pt"/>
    </style:style>
    <style:style style:name="P35" style:family="paragraph" style:parent-style-name="body">
      <style:text-properties style:font-name="Times New Roman" fo:font-size="13pt" officeooo:paragraph-rsid="00062716" style:font-size-asian="13pt" style:font-size-complex="13pt"/>
    </style:style>
    <style:style style:name="P36"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8f373" officeooo:paragraph-rsid="00062716" style:font-size-asian="13pt" style:font-weight-asian="normal" style:font-name-complex="Times New Roman1" style:font-size-complex="13pt" style:font-weight-complex="normal"/>
    </style:style>
    <style:style style:name="P37"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8f373" officeooo:paragraph-rsid="000ce076" style:font-size-asian="13pt" style:font-weight-asian="normal" style:font-name-complex="Times New Roman1" style:font-size-complex="13pt" style:font-weight-complex="normal"/>
    </style:style>
    <style:style style:name="P38" style:family="paragraph" style:parent-style-name="Standard">
      <style:paragraph-properties fo:margin-left="0in" fo:margin-right="0in" fo:line-height="120%" fo:text-align="center"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28f373" officeooo:paragraph-rsid="00062716" style:font-size-asian="13pt" style:font-weight-asian="normal" style:font-name-complex="Times New Roman1" style:font-size-complex="13pt" style:font-weight-complex="normal"/>
    </style:style>
    <style:style style:name="P39" style:family="paragraph" style:parent-style-name="Standard">
      <style:paragraph-properties fo:margin-left="0in" fo:margin-right="0in" fo:line-height="120%" fo:text-align="center" style:justify-single-word="false" fo:orphans="2" fo:widows="2" fo:text-indent="0.3937in" style:auto-text-indent="false"/>
      <style:text-properties fo:font-variant="normal" fo:text-transform="none" fo:color="#000000" style:font-name="Times New Roman" fo:font-size="13pt" fo:letter-spacing="normal" fo:language="vi" fo:country="VN" fo:font-style="normal" fo:font-weight="normal" officeooo:rsid="0006428e" officeooo:paragraph-rsid="0006428e" style:font-size-asian="13pt" style:font-weight-asian="normal" style:font-name-complex="Times New Roman1" style:font-size-complex="13pt" style:font-weight-complex="normal"/>
    </style:style>
    <style:style style:name="P40"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8f373" officeooo:paragraph-rsid="00062716" style:font-size-asian="13pt" style:font-weight-asian="normal" style:font-name-complex="Times New Roman1" style:font-size-complex="13pt" style:font-weight-complex="normal"/>
    </style:style>
    <style:style style:name="P41"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8f373" officeooo:paragraph-rsid="000a0aeb" style:font-size-asian="13pt" style:font-weight-asian="normal" style:font-name-complex="Times New Roman1" style:font-size-complex="13pt" style:font-weight-complex="normal"/>
    </style:style>
    <style:style style:name="P42"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8f373" officeooo:paragraph-rsid="000ce076" style:font-size-asian="13pt" style:font-weight-asian="normal" style:font-name-complex="Times New Roman1" style:font-size-complex="13pt" style:font-weight-complex="normal"/>
    </style:style>
    <style:style style:name="P43" style:family="paragraph" style:parent-style-name="Standard">
      <style:paragraph-properties fo:margin-left="0in" fo:margin-right="0in" fo:line-height="120%" fo:text-align="justify"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8f373" officeooo:paragraph-rsid="0006428e" style:font-size-asian="13pt" style:font-weight-asian="normal" style:font-name-complex="Times New Roman1" style:font-size-complex="13pt" style:font-weight-complex="normal"/>
    </style:style>
    <style:style style:name="P44" style:family="paragraph" style:parent-style-name="Standard">
      <style:paragraph-properties fo:margin-left="0in" fo:margin-right="0in" fo:line-height="120%" fo:text-align="center" style:justify-single-word="false" fo:orphans="2" fo:widows="2" fo:text-indent="0.3937in" style:auto-text-indent="false"/>
      <style:text-properties fo:font-variant="normal" fo:text-transform="none" fo:color="#000000" style:font-name="Times New Roman" fo:font-size="13pt" fo:letter-spacing="normal" fo:font-style="normal" fo:font-weight="normal" officeooo:rsid="0028f373" officeooo:paragraph-rsid="00062716" style:font-size-asian="13pt" style:font-weight-asian="normal" style:font-name-complex="Times New Roman1" style:font-size-complex="13pt" style:font-weight-complex="normal"/>
    </style:style>
    <style:style style:name="P45" style:family="paragraph" style:parent-style-name="Standard">
      <style:paragraph-properties fo:margin-left="0in" fo:margin-right="0in" fo:line-height="120%" fo:text-align="justify" style:justify-single-word="false" fo:orphans="2" fo:widows="2" fo:text-indent="0in" style:auto-text-indent="false"/>
      <style:text-properties fo:font-variant="normal" fo:text-transform="none" fo:color="#000000" style:font-name="Times New Roman" fo:font-size="13pt" fo:letter-spacing="normal" fo:font-style="normal" fo:font-weight="normal" officeooo:rsid="0028f373" officeooo:paragraph-rsid="00062716" style:font-size-asian="13pt" style:font-weight-asian="normal" style:font-name-complex="Times New Roman1" style:font-size-complex="13pt" style:font-weight-complex="normal"/>
    </style:style>
    <style:style style:name="T1" style:family="text">
      <style:text-properties officeooo:rsid="00243963"/>
    </style:style>
    <style:style style:name="T2" style:family="text">
      <style:text-properties officeooo:rsid="00244cc8"/>
    </style:style>
    <style:style style:name="T3" style:family="text">
      <style:text-properties officeooo:rsid="00264489"/>
    </style:style>
    <style:style style:name="T4" style:family="text">
      <style:text-properties fo:language="vi" fo:country="VN"/>
    </style:style>
    <style:style style:name="T5" style:family="text">
      <style:text-properties fo:language="vi" fo:country="VN" officeooo:rsid="00264489" style:font-weight-asian="normal" style:font-name-complex="Times New Roman1" style:font-weight-complex="normal"/>
    </style:style>
    <style:style style:name="T6" style:family="text">
      <style:text-properties fo:language="vi" fo:country="VN" style:font-name-complex="Times New Roman1"/>
    </style:style>
    <style:style style:name="T7" style:family="text">
      <style:text-properties fo:language="vi" fo:country="VN" style:font-name-complex="Times New Roman1" style:font-weight-complex="bold"/>
    </style:style>
    <style:style style:name="T8" style:family="text">
      <style:text-properties fo:language="vi" fo:country="VN" officeooo:rsid="00243963"/>
    </style:style>
    <style:style style:name="T9" style:family="text">
      <style:text-properties fo:language="vi" fo:country="VN" officeooo:rsid="0023bb3a"/>
    </style:style>
    <style:style style:name="T10" style:family="text">
      <style:text-properties fo:language="vi" fo:country="VN" officeooo:rsid="0006d5cf"/>
    </style:style>
    <style:style style:name="T11" style:family="text">
      <style:text-properties fo:language="vi" fo:country="VN" officeooo:rsid="000a0aeb"/>
    </style:style>
    <style:style style:name="T12" style:family="text">
      <style:text-properties fo:language="vi" fo:country="VN" officeooo:rsid="000bad92"/>
    </style:style>
    <style:style style:name="T13" style:family="text">
      <style:text-properties fo:language="vi" fo:country="VN" officeooo:rsid="000ce076"/>
    </style:style>
    <style:style style:name="T14" style:family="text">
      <style:text-properties fo:color="#292b2c"/>
    </style:style>
    <style:style style:name="T15" style:family="text">
      <style:text-properties fo:color="#292b2c" officeooo:rsid="00264489"/>
    </style:style>
    <style:style style:name="T16" style:family="text">
      <style:text-properties fo:color="#292b2c" fo:background-color="#ffffff" loext:char-shading-value="0"/>
    </style:style>
    <style:style style:name="T17" style:family="text">
      <style:text-properties fo:color="#292b2c" fo:background-color="#ffffff" loext:char-shading-value="0" style:font-name-complex="Times New Roman2"/>
    </style:style>
    <style:style style:name="T18" style:family="text">
      <style:text-properties fo:color="#292b2c" style:font-weight-complex="bold"/>
    </style:style>
    <style:style style:name="T19" style:family="text">
      <style:text-properties style:use-window-font-color="true" fo:background-color="#ffffff" loext:char-shading-value="0"/>
    </style:style>
    <style:style style:name="T20" style:family="text">
      <style:text-properties style:font-weight-complex="bold"/>
    </style:style>
    <style:style style:name="T21" style:family="text">
      <style:text-properties fo:background-color="#ffffff" loext:char-shading-value="0" style:font-weight-complex="bold"/>
    </style:style>
    <style:style style:name="T22" style:family="text">
      <style:text-properties officeooo:rsid="00269f8c"/>
    </style:style>
    <style:style style:name="T23" style:family="text">
      <style:text-properties officeooo:rsid="0006428e"/>
    </style:style>
    <style:style style:name="fr1" style:family="graphic" style:parent-style-name="Graphics">
      <style:graphic-properties fo:margin-left="0in" fo:margin-right="0.0055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55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2: Xây dựng hệ thống cơ sở dữ liệu chuẩn có chức năng lưu trữ và cập nhật các thông số về môi trường thông qua hệ thống mạng cảm biế<text:span text:style-name="T1">n</text:span></text:p>
      <text:p text:style-name="P4">- <text:span text:style-name="T1">Trong bài toán này c</text:span>ần xây dựng 2 cơ sở dữ liệu để lưu trữ và cập nhật các thông số về môi trường:</text:p>
      <text:p text:style-name="P4">+ <text:span text:style-name="T1">Thứ nhất là c</text:span>ơ sở dữ liệu trên Cloud ( có thể dùng điện thoại để theo dõi thông số qua internet)</text:p>
      <text:p text:style-name="P4">+ <text:span text:style-name="T1">Thứ hai là c</text:span>ơ sở dữ liệu trên Gateway ( <text:span text:style-name="T1">khi không có mạng vẫn có thể theo dõi trên local)</text:span></text:p>
      <text:p text:style-name="P4">- Để <text:span text:style-name="T1">có thể lưu trữ dữ liệu một cách linh hoạt, đơn giản, vừa trên Cloud và trên Gateway thì MongoDB chính là cơ sở dữ liệu cần sử dụng</text:span></text:p>
      <text:p text:style-name="P5">4.2.1: <text:span text:style-name="T2">MongoDB là gì?</text:span></text:p>
      <text:p text:style-name="P5">- <text:span text:style-name="T2">MongDB là một hệ quản trị cơ sở dữ liệu mã nguồn mở, là CSDL thuộc NoSQL và được hàng triệu người sử dụng.</text:span></text:p>
      <text:p text:style-name="P5">- <text:span text:style-name="T2">MongoDB là 1 Database hướng tài liệu(document), các dữ liệu được lưu trữ trong document kiểu JSON thay vì dạng bảng như CSDL quan hệ nên truy vấn sẽ rất nhanh.</text:span></text:p>
      <text:p text:style-name="P5">- <text:span text:style-name="T2">Với CSDL quan hệ thì có khái niệm bảng, các CSDL quan hệ (như MySQL hay SQL Server …) sử dụng các bảng để lưu dữ liệu thì với MongoDB chúng ta sẽ dùng khái niệm là collection thay vì bảng.</text:span></text:p>
      <text:p text:style-name="P5">- <text:span text:style-name="T3">So với RDBMS thì trong MongoDB collection ứng với table, còn document sẽ ứng với row, MongoDB sẽ dùng các document thay cho row trong RDBMS.</text:span></text:p>
      <text:p text:style-name="P5">- <text:span text:style-name="T3">Các collection trong MongoDB được cấu trúc rất linh hoạt, cho phép các dữ liệu lưu trữ không cần tuân theo một cấu trúc nhất định.</text:span></text:p>
      <text:p text:style-name="P5">- <text:span text:style-name="T3">Thông tin liên quan được lưu trữ cùng nhau để truy cập truy vấn nhanh thông qua ngôn ngữ truy vấn MongoDB.</text:span></text:p>
      <text:p text:style-name="P6">4.2.2: Một số câu lệnh cơ bản trên MongoDB</text:p>
      <text:p text:style-name="P6"/>
      <table:table table:name="Table1" table:style-name="Table1">
        <table:table-column table:style-name="Table1.A" table:number-columns-repeated="3"/>
        <table:table-column table:style-name="Table1.D"/>
        <table:table-row>
          <table:table-cell table:style-name="Table1.A1" office:value-type="string">
            <text:p text:style-name="P32"/>
          </table:table-cell>
          <table:table-cell table:style-name="Table1.A1" office:value-type="string">
            <text:p text:style-name="P32">Data<text:span text:style-name="T3">base</text:span></text:p>
          </table:table-cell>
          <table:table-cell table:style-name="Table1.A1" office:value-type="string">
            <text:p text:style-name="P33">Collection</text:p>
          </table:table-cell>
          <table:table-cell table:style-name="Table1.D1" office:value-type="string">
            <text:p text:style-name="P32">Doc<text:span text:style-name="T3">ument</text:span></text:p>
          </table:table-cell>
        </table:table-row>
        <table:table-row>
          <table:table-cell table:style-name="Table1.A2" office:value-type="string">
            <text:p text:style-name="P33">Create</text:p>
          </table:table-cell>
          <table:table-cell table:style-name="Table1.A2" office:value-type="string">
            <text:p text:style-name="P32">use DATA<text:span text:style-name="T3">BASE_NAME</text:span></text:p>
          </table:table-cell>
          <table:table-cell table:style-name="Table1.A2" office:value-type="string">
            <text:p text:style-name="P32">db.<text:span text:style-name="T3">createCollection(name, options)</text:span></text:p>
          </table:table-cell>
          <table:table-cell table:style-name="Table1.D2" office:value-type="string">
            <text:p text:style-name="P32"/>
          </table:table-cell>
        </table:table-row>
        <table:table-row>
          <table:table-cell table:style-name="Table1.A2" office:value-type="string">
            <text:p text:style-name="P32">Delete</text:p>
          </table:table-cell>
          <table:table-cell table:style-name="Table1.A2" office:value-type="string">
            <text:p text:style-name="P32">db.dropDatabase(<text:span text:style-name="T3">)</text:span></text:p>
          </table:table-cell>
          <table:table-cell table:style-name="Table1.A2" office:value-type="string">
            <text:p text:style-name="P32">db.<text:span text:style-name="T3">COLLECTION_NAME.drop()</text:span></text:p>
          </table:table-cell>
          <table:table-cell table:style-name="Table1.D2" office:value-type="string">
            <text:p text:style-name="P32">db.<text:span text:style-name="T3">COLLECTION_NAME.remove(DELETION_CRITTERIA)</text:span></text:p>
          </table:table-cell>
        </table:table-row>
        <table:table-row>
          <table:table-cell table:style-name="Table1.A2" office:value-type="string">
            <text:p text:style-name="P32">Insert</text:p>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db.<text:span text:style-name="T3">COLLECTION_NAME.insert(document)</text:span></text:p>
          </table:table-cell>
        </table:table-row>
        <table:table-row>
          <table:table-cell table:style-name="Table1.A2" office:value-type="string">
            <text:p text:style-name="P33">Query</text:p>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db.<text:span text:style-name="T3">COLLECTION_NAME.find()</text:span></text:p>
          </table:table-cell>
        </table:table-row>
        <table:table-row>
          <table:table-cell table:style-name="Table1.A2" office:value-type="string">
            <text:p text:style-name="P32">Update</text:p>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db.<text:span text:style-name="T3">COLLECTION_NAME.update(SELECTION_CRITERIA, UPDATED_DATA)</text:span></text:p>
          </table:table-cell>
        </table:table-row>
        <text:soft-page-break/>
        <table:table-row>
          <table:table-cell table:style-name="Table1.A2" office:value-type="string">
            <text:p text:style-name="P33">Projection</text:p>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db.<text:span text:style-name="T3">COLLECTION_NAME.find({},{KEY:1})</text:span></text:p>
          </table:table-cell>
        </table:table-row>
        <table:table-row>
          <table:table-cell table:style-name="Table1.A2" office:value-type="string">
            <text:p text:style-name="P33">Limit recoreds</text:p>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db.<text:span text:style-name="T3">COLLECTION_NAME.find().limit(NUMBER)</text:span></text:p>
          </table:table-cell>
        </table:table-row>
        <table:table-row>
          <table:table-cell table:style-name="Table1.A2" office:value-type="string">
            <text:p text:style-name="P33">Sorting recoreds</text:p>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db.<text:span text:style-name="T3">COLLECTION_NAME.find().sort({KEY:1})</text:span></text:p>
          </table:table-cell>
        </table:table-row>
      </table:table>
      <text:p text:style-name="P7"/>
      <text:p text:style-name="P6">4.2.3: Ưu điểm của MongoDB</text:p>
      <text:p text:style-name="P10"><text:span text:style-name="T5">- </text:span><text:span text:style-name="T14">Do MongoDB sử dụng lưu trữ dữ liệu dưới dạng Document JSON nên mỗi một collection sẽ có các kích cỡ và các document khác nhau, linh hoạt trong việc lưu trữ dữ liệu.</text:span></text:p>
      <text:p text:style-name="P10"><text:span text:style-name="T5">- </text:span><text:span text:style-name="T14">Dữ liệu trong MongoDB không có sự ràng buộc lẫn nhau, không có join như trong RDBMS nên khi insert, xóa hay update nó không cần phải mất thời gian kiểm tra xem có thỏa mãn các ràng buộc dữ liệu như trong RDBMS.</text:span></text:p>
      <text:p text:style-name="P12">- MongoDB dễ mở rộng (Horizontal Scalability). Trong MongoDB có một khái niệm cluster là cụm các node chứa dữ liệu giao tiếp với nhau, khi muốn mở rộng hệ thống chỉ cần thêm một node với vào cluster.</text:p>
      <text:p text:style-name="P12"/>
      <text:p text:style-name="P12">- Trường dữ liệu “_id” luôn được tự động đánh index (chỉ mục) để tốc độ truy vấn thông tin đạt hiệu suất cao nhất.</text:p>
      <text:p text:style-name="P12">- Khi có một truy vấn dữ liệu, bản ghi được cached lên bộ nhớ Ram, để phục vụ lượt truy vấn sau diễn ra nhanh hơn mà không cần phải đọc từ ổ cứng.</text:p>
      <text:p text:style-name="P10"><text:span text:style-name="T14">- Hiệu năng cao: Tốc độ truy vấn (find, update, insert, delete) của MongoDB nhanh hơn hẳn so với các hệ quản trị cơ sở dữ liệu quan hệ (RDBMS). Với một lượng dữ liệu đủ lớn thì thử nghiệm cho thấy tốc độ insert của MongoDB có thể nhanh </text:span><text:span text:style-name="T15">gấp 100 lần so với MySQL.</text:span></text:p>
      <text:p text:style-name="P13">4.2.4: Nhược điểm của MongoDB</text:p>
      <text:p text:style-name="P13">- Sử dụng indexing nhiều và làm tốn nhiều tài nguyên RAM của hệ thống.</text:p>
      <text:p text:style-name="P13">- Hệ thống dễ dàng mở rộng mà không có điều kiện rang buộc, dễ dẫn tới tình trạng thất thoát dữ liệu.</text:p>
      <text:p text:style-name="P14">4.2.5: Cài đặt MongoDB</text:p>
      <text:p text:style-name="P14">a. Cài đặt MongoDB trên Window</text:p>
      <text:p text:style-name="P15"><text:span text:style-name="T16">Để cài đặt MongoDB trên Windows, trước tiên hãy tải xuống bản phát hành mới nhất của MongoDB từ </text:span><text:a xlink:type="simple" xlink:href="https://www.mongodb.org/downloads" office:target-frame-name="_blank" xlink:show="new" text:style-name="ListLabel_20_66" text:visited-style-name="ListLabel_20_66"><text:span text:style-name="Internet_20_link"><text:span text:style-name="T19">https://www.mongodb.org/downloads</text:span></text:span></text:a><text:span text:style-name="T16"> . Đảm bảo bạn có phiên bản MongoDB chính xác tùy thuộc vào phiên bản Windows của bạn. Để có được phiên bản Windows của bạn, hãy mở dấu nhắc lệnh và thực hiện lệnh sau.</text:span></text:p>
      <text:p text:style-name="P23">C:\&gt;wmic os get osarchitecture</text:p>
      <text:p text:style-name="P23">OSArchitecture</text:p>
      <text:p text:style-name="P23"><text:soft-page-break/>64-bit</text:p>
      <text:p text:style-name="P24"><text:a xlink:type="simple" xlink:href="../../../../../C:/" text:style-name="Internet_20_link" text:visited-style-name="Visited_20_Internet_20_Link">C:\</text:a><text:span text:style-name="T17">&gt;</text:span></text:p>
      <text:p text:style-name="P2"><text:tab/>Các phiên bản 32-bit của MongoDB chỉ hỗ trợ cơ sở dữ liệu nhỏ hơn 2GB và chỉ phù hợp với mục đích thử nghiệm và đánh giá.</text:p>
      <text:p text:style-name="P35"><text:s text:c="4"/>Bây giờ giải nén tập tin đã tải về của bạn vào ổ c: \ hoặc bất kỳ vị trí nào khác. Đảm bảo tên của thư mục được trích xuất là mongodb-win32-i386- [version] hoặc mongodb-win32-x86_64- [version]. Ở đây [phiên bản] là phiên bản tải xuống MongoDB.</text:p>
      <text:p text:style-name="P19"><text:s text:c="4"/>Tiếp theo, mở dấu nhắc lệnh và chạy lệnh sau.</text:p>
      <text:p text:style-name="P25">C:\&gt;move mongodb-win64-* mongodb</text:p>
      <text:p text:style-name="P25"><text:s text:c="3"/>1 dir(s) moved.</text:p>
      <text:p text:style-name="P26">C:\&gt;</text:p>
      <text:p text:style-name="P15"><text:span text:style-name="T14"><text:s text:c="2"/>Trong trường hợp bạn đã giải nén MongoDB ở vị trí khác, sau đó đi đến đường dẫn đó bằng cách sử dụng lệnh </text:span><text:span text:style-name="T18">cd FOOLDER / DIR</text:span><text:span text:style-name="T14"> và bây giờ chạy quy trình đã cho ở trên.</text:span></text:p>
      <text:p text:style-name="P19">MongoDB yêu cầu một thư mục dữ liệu để lưu trữ các tệp của nó. Vị trí mặc định cho thư mục dữ liệu MongoDB là c: \ data \ db. Vì vậy, bạn cần tạo thư mục này bằng Command Prompt. Thực thi chuỗi lệnh sau.</text:p>
      <text:p text:style-name="P25">C:\&gt;md data</text:p>
      <text:p text:style-name="P26">C:\md data\db</text:p>
      <text:p text:style-name="P2"><text:s/><text:tab/>Nếu bạn phải cài đặt MongoDB ở một vị trí khác, thì bạn cần chỉ định một đường dẫn thay thế cho <text:span text:style-name="T20">\ data \ db</text:span> bằng cách thiết lập đường dẫn <text:span text:style-name="T20">dbpath</text:span> trong <text:span text:style-name="T20">mongod.exe</text:span> . Đối với cùng, phát hành các lệnh sau.</text:p>
      <text:p text:style-name="P15"><text:span text:style-name="T14">Trong dấu nhắc lệnh, điều hướng đến thư mục bin có trong thư mục cài đặt MongoDB. Giả sử thư mục cài đặt của tôi là </text:span><text:span text:style-name="T18">D: \ set up \ mongodb.</text:span></text:p>
      <text:p text:style-name="P25">C:\Users\XYZ&gt;d:</text:p>
      <text:p text:style-name="P25">D:\&gt;cd "set up"</text:p>
      <text:p text:style-name="P25">D:\set up&gt;cd mongodb</text:p>
      <text:p text:style-name="P25">D:\set up\mongodb&gt;cd bin</text:p>
      <text:p text:style-name="P27">D:\set up\mongodb\bin&gt;mongod.exe --dbpath "d:\set up\mongodb\data" </text:p>
      <text:p text:style-name="P2"><text:tab/>Điều này sẽ hiển thị thông báo <text:span text:style-name="T21">waiting for connections </text:span>trên đầu ra của bàn điều khiển, cho biết rằng quá trình mongod.exe đang chạy thành công.</text:p>
      <text:p text:style-name="P15"><text:span text:style-name="T14"><text:s text:c="4"/>Bây giờ để chạy MongoDB, bạn cần mở </text:span><text:span text:style-name="T16">command prompt </text:span><text:span text:style-name="T14">khác và đưa ra lệnh sau đây.</text:span></text:p>
      <text:p text:style-name="P25">D:\set up\mongodb\bin&gt;mongo.exe</text:p>
      <text:p text:style-name="P25">MongoDB shell version: 2.4.6</text:p>
      <text:p text:style-name="P25">connecting to: test</text:p>
      <text:p text:style-name="P25">&gt;db.test.save( { a: 1 } )</text:p>
      <text:p text:style-name="P25">&gt;db.test.find()</text:p>
      <text:p text:style-name="P25">{ "_id" : ObjectId(5879b0f65a56a454), "a" : 1 }</text:p>
      <text:p text:style-name="P26">&gt;</text:p>
      <text:p text:style-name="P20"><text:soft-page-break/>Điều này sẽ cho thấy MongoDB được cài đặt và chạy thành công. Lần sau khi bạn chạy MongoDB, bạn chỉ cần chạy các lệnh.</text:p>
      <text:p text:style-name="P25">D:\set up\mongodb\bin&gt;mongod.exe --dbpath "d:\set up\mongodb\data" </text:p>
      <text:p text:style-name="P28">D:\set up\mongodb\bin&gt;mongo.exe</text:p>
      <text:p text:style-name="P14"/>
      <text:p text:style-name="P14">b. Cài đặt MongDB trên Ubuntu</text:p>
      <text:p text:style-name="P19">Chạy lệnh sau để nhập public GPG Key của MongoDB:</text:p>
      <text:p text:style-name="P26">Sudo apt-key adv –keyserver <text:s/>hkp://keyserver.ubuntu.com:80 –recv 7F0CEB10</text:p>
      <text:p text:style-name="P21">Tạo tệp /etc/apt/sources.list.d/mongodb.list bằng lệnh sau.</text:p>
      <text:p text:style-name="P25">echo ‘deb http:// downloads-distro.mongodb.org/repo/Ubuntu-upstart dist 10gen’ </text:p>
      <text:p text:style-name="P29">| sudo tee /etc/apt/sources.list.d/mongodb.list</text:p>
      <text:p text:style-name="P34"><text:tab/><text:span text:style-name="T22">Bây giờ ban hành lệnh sau để cập nhật kho lưu trữ:</text:span></text:p>
      <text:p text:style-name="P25">sudo apt-get update</text:p>
      <text:p text:style-name="P7"/>
      <text:p text:style-name="P9">Tiếp theo là cài đặt MongoDB theo các lệnh sau:</text:p>
      <text:p text:style-name="P30">apt-get install mongodb-10gen = 2.2.3</text:p>
      <text:p text:style-name="P3"><text:tab/>Trong bản cài đặt ở trên, 2.2.3 hiện đang được phát hành phiên bản MongoDB.Đảm bảo luôn cài đặt phiên bản mới nhất. Bây giờ MongoDB được cài đặt thành công.</text:p>
      <text:p text:style-name="P17">Bắt đầu MongoDB</text:p>
      <text:p text:style-name="P25">Sudo service mongodb start</text:p>
      <text:p text:style-name="P35">Ngừng MongoDB</text:p>
      <text:p text:style-name="P25">Sudo service mongodb stop</text:p>
      <text:p text:style-name="P22">Khởi động lại MongoDB</text:p>
      <text:p text:style-name="P25">Sudo service mongodb restart</text:p>
      <text:p text:style-name="P35">Để sử dụng MongoDB, hãy dử dụng lệnh sau:</text:p>
      <text:p text:style-name="P31">mongo</text:p>
      <text:p text:style-name="P7"/>
      <text:h text:style-name="P1" text:outline-level="2"><text:bookmark-start text:name="_Toc529570513"/><text:bookmark-start text:name="_Toc529570649"/><text:bookmark-start text:name="_Toc529568143"/><text:bookmark-start text:name="_Toc529568749"/>MongoDB Trợ giúp<text:bookmark-end text:name="_Toc529570513"/><text:bookmark-end text:name="_Toc529570649"/><text:bookmark-end text:name="_Toc529568143"/><text:bookmark-end text:name="_Toc529568749"/></text:h>
      <text:p text:style-name="P17"><text:s text:c="4"/>Để có được một danh sách các lệnh, gõ <text:span text:style-name="T20">db.help ()</text:span> trong máy khách MongoDB. Điều này sẽ cung cấp cho bạn một danh sách các lệnh như được hiển thị trong ảnh chụp màn hình sau đây.</text:p>
      <text:p text:style-name="P17"><text:soft-page-break/><draw:frame draw:style-name="fr1" draw:name="Picture 5" text:anchor-type="as-char" svg:y="-4.7291in" svg:width="5.2445in" svg:height="5.1626in" draw:z-index="0"><draw:image xlink:href="Pictures/10000000000001F7000001F00AAE08FBCBD29A3E.png" xlink:type="simple" xlink:show="embed" xlink:actuate="onLoad" loext:mime-type="image/png"/><svg:desc>Trợ giúp DB</svg:desc></draw:frame></text:p>
      <text:h text:style-name="P1" text:outline-level="2"><text:bookmark-start text:name="_Toc529570514"/><text:bookmark-start text:name="_Toc529570650"/><text:bookmark-start text:name="_Toc529568144"/><text:bookmark-start text:name="_Toc529568750"/>Thống kê MongoDB<text:bookmark-end text:name="_Toc529570514"/><text:bookmark-end text:name="_Toc529570650"/><text:bookmark-end text:name="_Toc529568144"/><text:bookmark-end text:name="_Toc529568750"/></text:h>
      <text:p text:style-name="P16"><text:span text:style-name="T6"><text:s text:c="4"/>Để có số liệu thống kê về máy chủ MongoDB, gõ lệnh </text:span><text:span text:style-name="T7">db.stats () </text:span><text:span text:style-name="T6">trong máy khách MongoDB. Điều này sẽ hiển thị tên database, số lượng collection và document trongdatabase. Đầu ra của lệnh được hiển thị trong ảnh chụp màn hình sau đây.</text:span></text:p>
      <text:p text:style-name="P18"/>
      <text:p text:style-name="P18"><draw:frame draw:style-name="fr2" draw:name="Picture 4" text:anchor-type="as-char" svg:width="6.2445in" svg:height="2.5583in" draw:z-index="1"><draw:image xlink:href="Pictures/1000020100000258000000F65C5C9010FFCD1EEB.png" xlink:type="simple" xlink:show="embed" xlink:actuate="onLoad" loext:mime-type="image/png"/><svg:desc>Thống kê DB</svg:desc></draw:frame></text:p>
      <text:p text:style-name="P8"/>
      <text:p text:style-name="P8"/>
      <text:p text:style-name="P11"><text:span text:style-name="T4">4.2.6: Xây dựng </text:span><text:span text:style-name="T8">c</text:span><text:span text:style-name="T9">ơ sở dữ liệu trên Cloud </text:span></text:p>
      <text:p text:style-name="P44"><draw:frame draw:style-name="fr4" draw:name="Image4" text:anchor-type="paragraph" svg:width="6.548in" svg:height="4.6756in" draw:z-index="5"><draw:image xlink:href="Pictures/10000201000003BF0000029E5C2DB01830A97848.png" xlink:type="simple" xlink:show="embed" xlink:actuate="onLoad" loext:mime-type="image/png"/></draw:frame><text:soft-page-break/><text:span text:style-name="T9"><text:s/></text:span><text:span text:style-name="T10">Dữ liệu được lưu trên MongoDB</text:span></text:p>
      <text:p text:style-name="P45"><text:span text:style-name="T10"><text:tab/></text:span><text:span text:style-name="T11">Trong collection “Smart Farm” gồm 5 Documents:</text:span></text:p>
      <text:p text:style-name="P11"><text:span text:style-name="T11">- seed Document: bao gồm 5 keys </text:span><text:span text:style-name="T12">là 5 giống cây hữu cơ </text:span><text:span text:style-name="T11">(tomato, cucumber, </text:span><text:span text:style-name="T12">cabbage, choy_sum, bok_choy)</text:span><text:span text:style-name="T11"> <text:s/></text:span></text:p>
      <text:p text:style-name="P42"><text:span text:style-name="T11">- germination days Document : </text:span><text:span text:style-name="T13">thể hiện thời gian nảy mầm của mỗi loại cây hữu cơ, ví dụ như cây cà chua <text:s/></text:span><text:span text:style-name="T11">germination days </text:span><text:span text:style-name="T13">sẽ là “35 ngày”</text:span></text:p>
      <text:p text:style-name="P11"><text:span text:style-name="T11">- development 1 days: </text:span><text:span text:style-name="T13">đây là giai đoạn phát triển 1 của cây là giai đoạn thu hoạch của cây</text:span></text:p>
      <text:p text:style-name="P41"><text:span text:style-name="T11">- development 2 days: đây là </text:span><text:span text:style-name="T13">giai đoạn ra hoa của cây</text:span></text:p>
      <text:p text:style-name="P42"><text:span text:style-name="T13">*Note: Trong 3 Documents: </text:span><text:span text:style-name="T11">germination days, <text:s/>development 1 days, <text:s/>development 2 days </text:span><text:span text:style-name="T13">sẽ gồm các key là : name ( tên giống cây hữu cơ), min_temp, max_temp, min_light, max_light, min_hum, max_hum, min_soil_moisture, max_soil_moisture, min_PH và max PH và value trả về là các giá trị của cảm biến đưa ra các mức cảnh báo tùy vào từng điều kiện sinh trưởng, phát triển của mỗi loại cây hữu cơ khác nhau.</text:span></text:p>
      <text:p text:style-name="P11"><text:span text:style-name="T9"/></text:p>
      <text:p text:style-name="P11"><text:span text:style-name="T9">4.</text:span><text:span text:style-name="T4">2.7. Xây dựng cơ sở dữ liệu trên Gateway</text:span></text:p>
      <text:p text:style-name="P36"/>
      <text:p text:style-name="P36"><draw:frame draw:style-name="fr3" draw:name="Image1" text:anchor-type="paragraph" svg:width="6.6929in" svg:height="3.5791in" draw:z-index="2"><draw:image xlink:href="Pictures/1000020100000710000003C78A9218AE1038AEC2.png" xlink:type="simple" xlink:show="embed" xlink:actuate="onLoad" loext:mime-type="image/png"/></draw:frame><text:soft-page-break/></text:p>
      <text:p text:style-name="P36"/>
      <text:p text:style-name="P36"><draw:frame draw:style-name="fr3" draw:name="Image2" text:anchor-type="paragraph" svg:width="6.6929in" svg:height="3.5602in" draw:z-index="3"><draw:image xlink:href="Pictures/1000020100000716000003C5AC6E4E1CAD9E913F.png" xlink:type="simple" xlink:show="embed" xlink:actuate="onLoad" loext:mime-type="image/png"/></draw:frame></text:p>
      <text:p text:style-name="P38">Dữ liệu <text:span text:style-name="T23">xem dưới dạng Table</text:span></text:p>
      <text:p text:style-name="P36"><draw:frame draw:style-name="fr3" draw:name="Image3" text:anchor-type="paragraph" svg:width="6.6929in" svg:height="3.3425in" draw:z-index="4"><draw:image xlink:href="Pictures/1000020100000724000003914FFF3D8EA1CE0E8E.png" xlink:type="simple" xlink:show="embed" xlink:actuate="onLoad" loext:mime-type="image/png"/></draw:frame><text:soft-page-break/><text:tab/><text:tab/><text:tab/><text:tab/></text:p>
      <text:p text:style-name="P39">Dữ liệu xem dưới dạng List</text:p>
      <text:p text:style-name="P43"><text:span text:style-name="T13">- Trong Cơ sở dữ liệu trên Gateway sẽ lưu giá trị của 5 loại cảm biến: Temperature, Humidity, Soil Moisture, Light, PH.</text:span></text:p>
      <text:p text:style-name="P3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left="0in" fo:margin-right="0in" fo:margin-top="0in" fo:margin-bottom="0.139in" loext:contextual-spacing="true" fo:line-height="150%" fo:text-align="justify" style:justify-single-word="false" fo:orphans="2" fo:widows="2" fo:text-indent="0.25in" style:auto-text-indent="false" style:writing-mode="lr-tb"/>
      <style:text-properties style:font-name="Times New Roman1" fo:font-family="'Times New Roman'" style:font-family-generic="roman" style:font-pitch="variable" fo:font-size="13pt" style:font-size-asian="13pt"/>
    </style:style>
    <style:style style:name="body" style:family="paragraph" style:parent-style-name="No_20_Spacing" style:default-outline-level="">
      <style:paragraph-properties fo:margin-top="0in" fo:margin-bottom="0.111in" loext:contextual-spacing="true"/>
      <style:text-properties fo:font-size="12pt" style:font-size-asian="12pt"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asian="Times New Roman2" style:font-family-asian="'Times New Roman'" style:font-family-generic-asian="system" style:font-pitch-asian="variable" style:language-asian="en" style:country-asian="US" style:font-name-complex="Courier New1" style:font-family-complex="'Courier New'"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111in" loext:contextual-spacing="false" fo:keep-together="always" fo:keep-with-next="always"/>
      <style:text-properties fo:color="#2e74b5" style:font-name="Calibri Light" fo:font-family="'Calibri Light'" style:font-family-generic="roman" style:font-pitch="variable" fo:font-size="13pt" style:font-name-asian="Noto Sans CJK SC Regular" style:font-family-asian="'Noto Sans CJK SC Regular'"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Internet_20_link" style:display-name="Internet link" style:family="text">
      <style:text-properties fo:color="#000080" style:text-underline-style="solid" style:text-underline-width="auto" style:text-underline-color="font-color"/>
    </style:style>
    <style:style style:name="ListLabel_20_66" style:display-name="ListLabel 66" style:family="text">
      <style:text-properties style:use-window-font-color="true" fo:font-size="13pt" fo:background-color="#ffffff" style:font-size-asian="13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0:38:47.743994612</meta:creation-date>
    <dc:date>2019-10-22T17:51:37.982015454</dc:date>
    <meta:editing-duration>PT32M59S</meta:editing-duration>
    <meta:editing-cycles>7</meta:editing-cycles>
    <meta:generator>LibreOffice/6.0.7.3$Linux_X86_64 LibreOffice_project/00m0$Build-3</meta:generator>
    <meta:document-statistic meta:table-count="1" meta:image-count="6" meta:object-count="0" meta:page-count="8" meta:paragraph-count="119" meta:word-count="1515" meta:character-count="7997" meta:non-whitespace-character-count="6553"/>
  </office:meta>
</office:document-meta>
</file>